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Encode Sans" svg:font-family="'Encode Sans', 'Encode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Flex" svg:font-family="'Roboto Flex', 'Roboto Flex Fallback', sans-serif"/>
  </office:font-face-decls>
  <office:automatic-styles>
    <style:style style:name="P1" style:family="paragraph" style:parent-style-name="Heading_20_2">
      <style:text-properties fo:font-variant="normal" fo:text-transform="none" fo:color="#ededed" loext:opacity="100%" style:font-name="Encode Sans" fo:font-size="24pt" fo:letter-spacing="normal" fo:font-style="normal" fo:font-weight="normal" loext:padding="0.049cm" loext:border="0.06pt solid #000000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529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635cm" style:contextual-spacing="false" fo:orphans="2" fo:widows="2" fo:text-indent="0cm" style:auto-text-indent="false" fo:padding="0.049cm" fo:border="0.06pt solid #000000"/>
    </style:style>
    <style:style style:name="P4" style:family="paragraph" style:parent-style-name="Heading_20_2">
      <style:paragraph-properties fo:margin-left="0cm" fo:margin-right="0cm" fo:margin-top="0cm" fo:margin-bottom="0.635cm" style:contextual-spacing="false" fo:orphans="2" fo:widows="2" fo:text-indent="0cm" style:auto-text-indent="false" fo:padding="0.049cm" fo:border="0.06pt solid #000000"/>
      <style:text-properties fo:font-variant="normal" fo:text-transform="none" fo:color="#f4f5f6" loext:opacity="100%" style:font-name="Roboto Flex" fo:font-size="1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635cm" style:contextual-spacing="false" fo:orphans="2" fo:widows="2" fo:text-indent="0cm" style:auto-text-indent="false" fo:padding="0.049cm" fo:border="0.06pt solid #000000"/>
      <style:text-properties fo:font-variant="normal" fo:text-transform="none" fo:color="#b1b2b9" loext:opacity="100%" style:font-name="Roboto Flex" fo:font-size="13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ededed" loext:opacity="100%" style:font-name="Roboto Flex" fo:font-size="14pt" fo:letter-spacing="normal" fo:font-style="normal" fo:font-weight="normal" loext:padding="0.049cm" loext:border="0.06pt solid #000000"/>
    </style:style>
    <style:style style:name="P7" style:family="paragraph" style:parent-style-name="Preformatted_20_Text">
      <loext:graphic-properties draw:fill="solid" draw:fill-color="#0c0d0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0c0d0e" fo:padding-left="0.847cm" fo:padding-right="0cm" fo:padding-top="0.847cm" fo:padding-bottom="0.847cm" fo:border-left="0.06pt solid #000000" fo:border-right="none" fo:border-top="0.06pt solid #000000" fo:border-bottom="0.06pt solid #000000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T1" style:family="text">
      <style:text-properties fo:font-variant="normal" fo:text-transform="none" fo:color="#b1b2b9" loext:opacity="100%" fo:font-family="'JetBrains Mono', 'JetBrains Mono Fallback'" fo:font-size="9pt" fo:letter-spacing="normal" fo:font-style="normal" fo:font-weight="normal" loext:padding="0.049cm" loext:border="0.06pt solid #000000"/>
    </style:style>
    <style:style style:name="T2" style:family="text">
      <style:text-properties fo:font-variant="normal" fo:text-transform="none" fo:color="#b1b2b9" loext:opacity="100%" style:font-name="Roboto Flex" fo:font-size="13.5pt" fo:letter-spacing="normal" fo:font-style="normal" fo:font-weight="normal"/>
    </style:style>
    <style:style style:name="T3" style:family="text">
      <style:text-properties fo:font-variant="normal" fo:text-transform="none" fo:color="#a6e22e" loext:opacity="100%" fo:font-family="ui-monospace, SFMono-Regular, Menlo, Monaco, Consolas, 'Liberation Mono', 'Courier New', monospace" fo:font-size="14pt" fo:letter-spacing="normal" fo:font-style="normal" fo:font-weight="bold" fo:background-color="#272822" loext:char-shading-value="0" loext:padding="0.049cm" loext:border="0.06pt solid #000000"/>
    </style:style>
    <style:style style:name="T4" style:family="text">
      <style:text-properties fo:font-variant="normal" fo:text-transform="none" fo:color="#dddddd" loext:opacity="100%" fo:font-family="ui-monospace, SFMono-Regular, Menlo, Monaco, Consolas, 'Liberation Mono', 'Courier New', monospace" fo:font-size="14pt" fo:letter-spacing="normal" fo:font-style="normal" fo:font-weight="normal" fo:background-color="#272822" loext:char-shading-value="0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5" style:family="text">
      <style:text-properties fo:font-variant="normal" fo:text-transform="none" fo:color="#a6e22e" loext:opacity="100%" fo:font-family="ui-monospace, SFMono-Regular, Menlo, Monaco, Consolas, 'Liberation Mono', 'Courier New', monospace" fo:font-size="14pt" fo:letter-spacing="normal" fo:font-style="normal" fo:font-weight="normal" fo:background-color="#272822" loext:char-shading-value="0" loext:padding="0.049cm" loext:border="0.06pt solid #000000"/>
    </style:style>
    <style:style style:name="T6" style:family="text">
      <style:text-properties fo:font-variant="normal" fo:text-transform="none" fo:color="#f92672" loext:opacity="100%" fo:font-family="ui-monospace, SFMono-Regular, Menlo, Monaco, Consolas, 'Liberation Mono', 'Courier New', monospace" fo:font-size="14pt" fo:letter-spacing="normal" fo:font-style="normal" fo:font-weight="bold" fo:background-color="#272822" loext:char-shading-value="0" loext:padding="0.049cm" loext:border="0.06pt solid #000000"/>
    </style:style>
    <style:style style:name="T7" style:family="text">
      <style:text-properties fo:font-variant="normal" fo:text-transform="none" fo:color="#dddddd" loext:opacity="100%" fo:letter-spacing="normal" fo:background-color="#272822" loext:char-shading-value="0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8" style:family="text">
      <style:text-properties fo:font-variant="normal" fo:text-transform="none" fo:color="#f4f5f6" loext:opacity="100%" fo:font-family="ui-monospace, SFMono-Regular, Menlo, Monaco, Consolas, 'Liberation Mono', 'Courier New', monospace" fo:font-size="13.5pt" fo:letter-spacing="normal" fo:font-style="normal" fo:font-weight="normal" fo:background-color="#292b2e" loext:char-shading-value="0" loext:padding-left="0.159cm" loext:padding-right="0cm" loext:padding-top="0.049cm" loext:padding-bottom="0.053cm" loext:border-left="0.06pt solid #000000" loext:border-right="none" loext:border-top="0.06pt solid #000000" loext:border-bottom="0.06pt solid #000000"/>
    </style:style>
    <style:style style:name="T9" style:family="text">
      <style:text-properties fo:font-variant="normal" fo:text-transform="none" fo:color="#b1b2b9" loext:opacity="100%" style:font-name="Roboto Flex" fo:font-size="13.5pt" fo:letter-spacing="normal" fo:font-style="normal" fo:font-weight="bold" loext:padding="0.049cm" loext:border="0.06pt solid #000000"/>
    </style:style>
    <style:style style:name="T10" style:family="text">
      <style:text-properties fo:font-variant="normal" fo:text-transform="none" fo:color="#a6e22e" loext:opacity="100%" fo:letter-spacing="normal" fo:background-color="#272822" loext:char-shading-value="0" loext:padding="0.049cm" loext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ra saber mais: strings e text blocks</text:h>
      <text:p text:style-name="P2"><text:span text:style-name="T1"/></text:p>
      <text:p text:style-name="P3"><text:span text:style-name="T2">Em Java, a classe String é uma das mais importantes e utilizadas. Ela é responsável por representar uma sequência de caracteres, ou seja, um texto.</text:span></text:p>
      <text:h text:style-name="P4" text:outline-level="2">Criação de Strings</text:h>
      <text:p text:style-name="P5">Para criar uma String em Java, basta utilizar aspas duplas para delimitar o texto. Por exemplo:</text:p>
      <text:p text:style-name="P6">Copiar</text:p>
      <text:p text:style-name="P7"><text:span text:style-name="Source_20_Text"><text:span text:style-name="T3">String</text:span></text:span><text:span text:style-name="Source_20_Text"><text:span text:style-name="T4"> nome = </text:span></text:span><text:span text:style-name="Source_20_Text"><text:span text:style-name="T5">"Alura"</text:span></text:span><text:span text:style-name="Source_20_Text"><text:span text:style-name="T4">;</text:span></text:span></text:p>
      <text:p text:style-name="P5">Nesse exemplo, a variável nome recebe uma String com o texto "Alura". É possível concatenar duas ou mais Strings utilizando o operador +, por exemplo:</text:p>
      <text:p text:style-name="P6">Copiar</text:p>
      <text:p text:style-name="P7"><text:span text:style-name="Source_20_Text"><text:span text:style-name="T3">String</text:span></text:span><text:span text:style-name="Source_20_Text"><text:span text:style-name="T4"> saudacao = </text:span></text:span><text:span text:style-name="Source_20_Text"><text:span text:style-name="T5">"Olá, "</text:span></text:span><text:span text:style-name="Source_20_Text"><text:span text:style-name="T4">;</text:span></text:span></text:p>
      <text:p text:style-name="P7"><text:span text:style-name="Source_20_Text"><text:span text:style-name="T3">String</text:span></text:span><text:span text:style-name="Source_20_Text"><text:span text:style-name="T4"> nome = </text:span></text:span><text:span text:style-name="Source_20_Text"><text:span text:style-name="T5">"Alura"</text:span></text:span><text:span text:style-name="Source_20_Text"><text:span text:style-name="T4">;</text:span></text:span></text:p>
      <text:p text:style-name="P7"><text:span text:style-name="Source_20_Text"><text:span text:style-name="T3">String</text:span></text:span><text:span text:style-name="Source_20_Text"><text:span text:style-name="T4"> mensagem = saudacao + nome + </text:span></text:span><text:span text:style-name="Source_20_Text"><text:span text:style-name="T5">"!"</text:span></text:span><text:span text:style-name="Source_20_Text"><text:span text:style-name="T4">;</text:span></text:span></text:p>
      <text:p text:style-name="P5">Nesse caso, a variável mensagem receberá a String "Olá, Alura!".</text:p>
      <text:h text:style-name="P4" text:outline-level="2">Comparação de Strings</text:h>
      <text:p text:style-name="P5">Em Java, é possível comparar duas Strings utilizando o operador ==. Porém, esse operador verifica apenas se as duas variáveis apontam para o mesmo objeto na memória, e não se o conteúdo das Strings é igual. Para comparar o conteúdo de duas Strings, é necessário utilizar o método equals(). Por exemplo:</text:p>
      <text:p text:style-name="P6">Copiar</text:p>
      <text:p text:style-name="P7"><text:soft-page-break/><text:span text:style-name="Source_20_Text"><text:span text:style-name="T4">String senha = </text:span></text:span><text:span text:style-name="Source_20_Text"><text:span text:style-name="T5">"12345"</text:span></text:span><text:span text:style-name="Source_20_Text"><text:span text:style-name="T4">;</text:span></text:span></text:p>
      <text:p text:style-name="P7"><text:span text:style-name="Source_20_Text"><text:span text:style-name="T6">if</text:span></text:span><text:span text:style-name="Source_20_Text"><text:span text:style-name="T4"> (senha.</text:span></text:span><text:span text:style-name="Source_20_Text"><text:span text:style-name="T6">equals</text:span></text:span><text:span text:style-name="Source_20_Text"><text:span text:style-name="T4">(</text:span></text:span><text:span text:style-name="Source_20_Text"><text:span text:style-name="T5">"12345"</text:span></text:span><text:span text:style-name="Source_20_Text"><text:span text:style-name="T4">)) {</text:span></text:span></text:p>
      <text:p text:style-name="P7"><text:span text:style-name="Source_20_Text"><text:span text:style-name="T7"><text:s text:c="4"/></text:span></text:span><text:span text:style-name="Source_20_Text"><text:span text:style-name="T4">System.</text:span></text:span><text:span text:style-name="Source_20_Text"><text:span text:style-name="T6">out</text:span></text:span><text:span text:style-name="Source_20_Text"><text:span text:style-name="T4">.println(</text:span></text:span><text:span text:style-name="Source_20_Text"><text:span text:style-name="T5">"Acesso autorizado!"</text:span></text:span><text:span text:style-name="Source_20_Text"><text:span text:style-name="T4">);</text:span></text:span></text:p>
      <text:p text:style-name="P7"><text:span text:style-name="Source_20_Text"><text:span text:style-name="T4">} </text:span></text:span><text:span text:style-name="Source_20_Text"><text:span text:style-name="T6">else</text:span></text:span><text:span text:style-name="Source_20_Text"><text:span text:style-name="T4"> {</text:span></text:span></text:p>
      <text:p text:style-name="P7"><text:span text:style-name="Source_20_Text"><text:span text:style-name="T7"><text:s text:c="4"/></text:span></text:span><text:span text:style-name="Source_20_Text"><text:span text:style-name="T4">System.</text:span></text:span><text:span text:style-name="Source_20_Text"><text:span text:style-name="T6">out</text:span></text:span><text:span text:style-name="Source_20_Text"><text:span text:style-name="T4">.println(</text:span></text:span><text:span text:style-name="Source_20_Text"><text:span text:style-name="T5">"Senha incorreta."</text:span></text:span><text:span text:style-name="Source_20_Text"><text:span text:style-name="T4">);</text:span></text:span></text:p>
      <text:p text:style-name="P7"><text:span text:style-name="Source_20_Text"><text:span text:style-name="T4">}</text:span></text:span></text:p>
      <text:p text:style-name="P8"><text:span text:style-name="T2">Nesse caso, o método </text:span><text:span text:style-name="Source_20_Text"><text:span text:style-name="T8">equals()</text:span></text:span><text:span text:style-name="T2"> é utilizado para comparar o conteúdo da variável senha com a String "12345". Se as duas Strings forem iguais, a mensagem "Acesso autorizado!" será impressa, caso contrário, a mensagem "Senha incorreta." será impressa.</text:span></text:p>
      <text:p text:style-name="P8"><text:span text:style-name="T2">Mais adiante trabalharemos também com o método </text:span><text:span text:style-name="Source_20_Text"><text:span text:style-name="T8">equalsIgnoreCase()</text:span></text:span><text:span text:style-name="T2">, que é usado para que a comparação de Strings desconsidere as letras maiúsculas e minúsculas. Utilizando apenas o equals, as String “alura” e “Alura” seriam consideradas diferentes.</text:span></text:p>
      <text:h text:style-name="P4" text:outline-level="2">Text Block</text:h>
      <text:p text:style-name="P5">Introduzido na versão 15 do Java, o Text Block é uma nova forma de representar Strings que facilitam a escrita de textos com múltiplas linhas. Em vez de utilizar aspas duplas para delimitar o texto e inserir quebras de linha manualmente, ou utilizar concatenações, é possível utilizar uma sintaxe mais simples que permite inserir o texto exatamente como ele é.</text:p>
      <text:h text:style-name="P4" text:outline-level="2">Sintaxe do Text Block</text:h>
      <text:p text:style-name="P8"><text:span text:style-name="T2">Para criar um Text Block em Java, basta utilizar </text:span><text:span text:style-name="Strong_20_Emphasis"><text:span text:style-name="T9">três</text:span></text:span><text:span text:style-name="T2"> aspas duplas para delimitar o texto, seguidas de uma quebra de linha. Por exemplo:</text:span></text:p>
      <text:p text:style-name="P6">Copiar</text:p>
      <text:p text:style-name="P7"><text:span text:style-name="Source_20_Text"><text:span text:style-name="T4">String mensagem = </text:span></text:span><text:span text:style-name="Source_20_Text"><text:span text:style-name="T5">"""</text:span></text:span></text:p>
      <text:p text:style-name="P7"><text:span text:style-name="Source_20_Text"><text:span text:style-name="T10"><text:s text:c="18"/></text:span></text:span><text:span text:style-name="Source_20_Text"><text:span text:style-name="T5">Olá, mundo!</text:span></text:span></text:p>
      <text:p text:style-name="P7"><text:span text:style-name="Source_20_Text"><text:span text:style-name="T10"><text:s text:c="18"/></text:span></text:span><text:span text:style-name="Source_20_Text"><text:span text:style-name="T5">Este é um Text Block.</text:span></text:span></text:p>
      <text:p text:style-name="P7"><text:span text:style-name="Source_20_Text"><text:span text:style-name="T10"><text:s text:c="18"/></text:span></text:span><text:span text:style-name="Source_20_Text"><text:span text:style-name="T5">Ele permite escrever textos com múltiplas linhas</text:span></text:span></text:p>
      <text:p text:style-name="P7"><text:soft-page-break/><text:span text:style-name="Source_20_Text"><text:span text:style-name="T10"><text:s text:c="18"/></text:span></text:span><text:span text:style-name="Source_20_Text"><text:span text:style-name="T5">sem precisar usar caracteres de escape ou quebras de linha manualmente ou concatenações.</text:span></text:span></text:p>
      <text:p text:style-name="P7"><text:span text:style-name="Source_20_Text"><text:span text:style-name="T10"><text:s text:c="18"/></text:span></text:span><text:span text:style-name="Source_20_Text"><text:span text:style-name="T5">"""</text:span></text:span><text:span text:style-name="Source_20_Text"><text:span text:style-name="T4">;</text:span></text:span></text:p>
      <text:p text:style-name="P5">Nesse exemplo, a variável mensagem recebe um Text Block com o texto "Olá, mundo! Este é um Text Block. Ele permite escrever textos com múltiplas linhas sem precisar usar caracteres de escape ou quebras de linha manualmente!"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Encode Sans" svg:font-family="'Encode Sans', 'Encode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Flex" svg:font-family="'Roboto Flex', 'Roboto Flex Fallback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8T12:11:18.145939100</meta:creation-date>
    <dc:date>2026-06-18T12:11:41.085410000</dc:date>
    <meta:editing-duration>PT23S</meta:editing-duration>
    <meta:editing-cycles>1</meta:editing-cycles>
    <meta:document-statistic meta:table-count="0" meta:image-count="0" meta:object-count="0" meta:page-count="3" meta:paragraph-count="35" meta:word-count="412" meta:character-count="2646" meta:non-whitespace-character-count="2171"/>
    <meta:generator>LibreOffice/25.8.6.2$Windows_X86_64 LibreOffice_project/b4b39682cd9868fa725bc664aff94278d315bd04</meta:generator>
  </office:meta>
</office:document-meta>
</file>