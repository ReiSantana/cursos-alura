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0E618B2041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f4f5f6" loext:opacity="100%" style:font-name="Roboto Flex" fo:font-size="15pt" fo:letter-spacing="normal" fo:font-style="normal" fo:font-weight="normal"/>
    </style:style>
    <style:style style:name="P5" style:family="paragraph" style:parent-style-name="Preformatted_20_Text">
      <loext:graphic-properties draw:fill="solid" draw:fill-color="#0c0d0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c0d0e" fo:padding-left="0.847cm" fo:padding-right="0cm" fo:padding-top="0.847cm" fo:padding-bottom="0.847cm" fo:border-left="0.06pt solid #000000" fo:border-right="none" fo:border-top="0.06pt solid #000000" fo:border-bottom="0.06pt solid #000000"/>
    </style:style>
    <style:style style:name="P6" style:family="paragraph">
      <loext:graphic-properties draw:fill="none" draw:fill-color="#ffffff"/>
    </style:style>
    <style:style style:name="P7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fo:letter-spacing="normal"/>
    </style:style>
    <style:style style:name="T1" style:family="text">
      <style:text-properties fo:font-variant="normal" fo:text-transform="none" fo:color="#dddddd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fo:font-variant="normal" fo:text-transform="none" fo:color="#66d9ef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3" style:family="text">
      <style:text-properties fo:font-variant="normal" fo:text-transform="none" fo:color="#949688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58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casting</text:h>
      <text:p text:style-name="P2"/>
      <text:p text:style-name="P3">Casting é um recurso utilizado em Java para converter um tipo de dado em outro. Essa conversão pode ser feita de forma automática pelo compilador (conversão implícita), quando o tipo de dado de destino é compatível com o tipo de dado de origem, ou de forma manual (conversão explícita), utilizando o operador de casting.</text:p>
      <text:p text:style-name="P3">O casting é utilizado para permitir que tipos de dados incompatíveis possam ser utilizados em uma mesma operação ou expressão. Por exemplo, se um método espera um parâmetro do tipo int e o valor que se deseja passar é do tipo double, é necessário fazer um casting para converter o valor em int.</text:p>
      <text:h text:style-name="P4" text:outline-level="2">Casting implícito</text:h>
      <text:p text:style-name="P3">O casting implícito é realizado automaticamente pelo compilador quando o tipo de dado de origem é compatível com o tipo de dado de destino. Por exemplo, é possível atribuir um valor de tipo int a uma variável do tipo double, pois o tipo double é maior e suporta todos os valores que o tipo int pode armazenar:</text:p>
      <text:p text:style-name="P5"><text:span text:style-name="Source_20_Text"><text:span text:style-name="T1">int </text:span></text:span><text:span text:style-name="Source_20_Text"><text:span text:style-name="T2">x</text:span></text:span><text:span text:style-name="Source_20_Text"><text:span text:style-name="T1"> = </text:span></text:span><text:span text:style-name="Source_20_Text"><text:span text:style-name="T2">10</text:span></text:span><text:span text:style-name="Source_20_Text"><text:span text:style-name="T1">;</text:span></text:span></text:p>
      <text:p text:style-name="P5"><text:span text:style-name="Source_20_Text"><text:span text:style-name="T1">double </text:span></text:span><text:span text:style-name="Source_20_Text"><text:span text:style-name="T2">y</text:span></text:span><text:span text:style-name="Source_20_Text"><text:span text:style-name="T1"> = </text:span></text:span><text:span text:style-name="Source_20_Text"><text:span text:style-name="T2">x</text:span></text:span><text:span text:style-name="Source_20_Text"><text:span text:style-name="T1">; </text:span></text:span><text:span text:style-name="Source_20_Text"><text:span text:style-name="T3">// casting implícito</text:span></text:span></text:p>
      <text:h text:style-name="P4" text:outline-level="2">Casting explícito</text:h>
      <text:p text:style-name="P3">O casting explícito é realizado quando o tipo de dado de origem é incompatível com o tipo de dado de destino. Nesse caso, devemos utilizar o operador de casting para realizar a conversão:</text:p>
      <text:p text:style-name="P5"><text:span text:style-name="Source_20_Text"><text:span text:style-name="T1">double </text:span></text:span><text:span text:style-name="Source_20_Text"><text:span text:style-name="T2">x</text:span></text:span><text:span text:style-name="Source_20_Text"><text:span text:style-name="T1"> = </text:span></text:span><text:span text:style-name="Source_20_Text"><text:span text:style-name="T2">10.5</text:span></text:span><text:span text:style-name="Source_20_Text"><text:span text:style-name="T1">;</text:span></text:span></text:p>
      <text:p text:style-name="P5"><text:span text:style-name="Source_20_Text"><text:span text:style-name="T1">int </text:span></text:span><text:span text:style-name="Source_20_Text"><text:span text:style-name="T2">y</text:span></text:span><text:span text:style-name="Source_20_Text"><text:span text:style-name="T1"> = (int) </text:span></text:span><text:span text:style-name="Source_20_Text"><text:span text:style-name="T2">x</text:span></text:span><text:span text:style-name="Source_20_Text"><text:span text:style-name="T1">; </text:span></text:span><text:span text:style-name="Source_20_Text"><text:span text:style-name="T3">// casting explícito</text:span></text:span></text:p>
      <text:p text:style-name="P3">No exemplo anterior, o valor da variável x é convertido em um valor inteiro utilizando o casting explícito. É importante notar que, neste caso, a parte decimal será descartada e o valor atribuído à variável y será 10.</text:p>
      <text:p text:style-name="P3"><draw:frame text:anchor-type="paragraph" draw:z-index="0" draw:name="Quadro de texto 1" draw:style-name="gr1" draw:text-style-name="P6" svg:width="4.763cm" svg:height="1.059cm" svg:x="2.254cm" svg:y="1.617cm"><draw:text-box><text:p/></draw:text-box></draw:frame><text:soft-page-break/>Abaixo tem uma tabela, onde você pode visualizar mais facilmente as conversões que são implícitas e as que necessitam ser feitas de forma explícita.<draw:frame draw:style-name="fr1" draw:name="Figura1" text:anchor-type="char" svg:x="1.76cm" svg:y="2.54cm" svg:width="11.663cm" svg:height="4.868cm" draw:z-index="1"><draw:image xlink:href="Pictures/1000000000000227000000E618B20416.png" xlink:type="simple" xlink:show="embed" xlink:actuate="onLoad" draw:mime-type="image/png"/></draw:frame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4:24:18.420026300</meta:creation-date>
    <dc:date>2026-06-18T14:26:19.183449600</dc:date>
    <meta:editing-duration>PT2M1S</meta:editing-duration>
    <meta:editing-cycles>1</meta:editing-cycles>
    <meta:document-statistic meta:table-count="0" meta:image-count="1" meta:object-count="0" meta:page-count="2" meta:paragraph-count="13" meta:word-count="290" meta:character-count="1631" meta:non-whitespace-character-count="1354"/>
    <meta:generator>LibreOffice/25.8.6.2$Windows_X86_64 LibreOffice_project/b4b39682cd9868fa725bc664aff94278d315bd04</meta:generator>
  </office:meta>
</office:document-meta>
</file>