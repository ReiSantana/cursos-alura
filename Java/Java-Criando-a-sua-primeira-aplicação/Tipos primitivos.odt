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ncode Sans" svg:font-family="'Encode Sans', 'Encode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Flex" svg:font-family="'Roboto Flex', 'Roboto Flex Fallback', sans-serif"/>
  </office:font-face-decls>
  <office:automatic-styles>
    <style:style style:name="P1" style:family="paragraph" style:parent-style-name="Heading_20_2">
      <style:text-properties fo:font-variant="normal" fo:text-transform="none" fo:color="#ededed" loext:opacity="100%" style:font-name="Encode Sans" fo:font-size="24pt" fo:letter-spacing="normal" fo:font-style="normal" fo:font-weight="normal" loext:padding="0.049cm" loext:border="0.06pt solid 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4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P5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b1b2b9" loext:opacity="100%" fo:font-family="'JetBrains Mono', 'JetBrains Mono Fallback'" fo:font-size="9pt" fo:letter-spacing="normal" fo:font-style="normal" fo:font-weight="normal" loext:padding="0.049cm" loext:border="0.06pt solid #000000"/>
    </style:style>
    <style:style style:name="T2" style:family="text"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T3" style:family="text">
      <style:text-properties fo:font-variant="normal" fo:text-transform="none" fo:color="#b1b2b9" loext:opacity="100%" style:font-name="Roboto Flex" fo:font-size="13.5pt" fo:letter-spacing="normal" fo:font-style="normal" fo:font-weight="bold" loext:padding="0.049cm" loext:border="0.06pt solid #000000"/>
    </style:style>
    <style:style style:name="T4" style:family="text">
      <style:text-properties fo:font-variant="normal" fo:text-transform="none" fo:color="#f4f5f6" loext:opacity="100%" style:font-name="Roboto Flex" fo:font-size="15pt" fo:letter-spacing="normal" fo:font-style="normal" fo:font-weight="bold"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a saber mais: tipos primitivos</text:h>
      <text:p text:style-name="P2"><text:a xlink:type="simple" xlink:href="https://cursos.alura.com.br/forum/curso-java-criando-primeira-aplicacao/exercicio-para-saber-mais-tipos-primitivos/125644/novo" office:target-frame-name="_blank" xlink:show="new" text:style-name="Internet_20_link" text:visited-style-name="Visited_20_Internet_20_Link"><text:span text:style-name="T1"/></text:a></text:p>
      <text:p text:style-name="P3"><text:span text:style-name="T2">Em Java, assim como na maioria das linguagens de programação, existem os </text:span><text:span text:style-name="Strong_20_Emphasis"><text:span text:style-name="T3">tipos primitivos</text:span></text:span><text:span text:style-name="T2">, que são os tipos de dados mais básicos e fundamentais da linguagem. Eles são utilizados para representar valores simples e são definidos pela própria linguagem.</text:span></text:p>
      <text:p text:style-name="P4">Java possui oito tipos primitivos diferentes: boolean, byte, char, short, int, long, float e double. Cada um desses tipos possui suas próprias características e faixa de valores permitidos, conforme será descrito a seguir.</text:p>
      <text:h text:style-name="P5" text:outline-level="3"><text:span text:style-name="Strong_20_Emphasis"><text:span text:style-name="T4">boolean</text:span></text:span></text:h>
      <text:p text:style-name="P4">O tipo boolean é utilizado para representar valores lógicos, podendo assumir apenas dois valores: true ou false. É utilizado em expressões condicionais, loops e outros casos onde se deseja avaliar se uma determinada condição é verdadeira ou falsa.</text:p>
      <text:h text:style-name="P5" text:outline-level="3"><text:span text:style-name="Strong_20_Emphasis"><text:span text:style-name="T4">byte</text:span></text:span></text:h>
      <text:p text:style-name="P4">O tipo byte é utilizado para representar valores numéricos inteiros de 8 bits. Ele possui uma faixa de valores de -128 a 127.</text:p>
      <text:h text:style-name="P5" text:outline-level="3"><text:span text:style-name="Strong_20_Emphasis"><text:span text:style-name="T4">char</text:span></text:span></text:h>
      <text:p text:style-name="P4">O tipo char é utilizado para representar caracteres individuais. Ele pode armazenar qualquer caractere Unicode e é representado por aspas simples ('').</text:p>
      <text:h text:style-name="P5" text:outline-level="3"><text:span text:style-name="Strong_20_Emphasis"><text:span text:style-name="T4">short</text:span></text:span></text:h>
      <text:p text:style-name="P4">O tipo short é utilizado para representar valores numéricos inteiros de 16 bits. Ele possui uma faixa de valores de -32.768 a 32.767.</text:p>
      <text:h text:style-name="P5" text:outline-level="3"><text:span text:style-name="Strong_20_Emphasis"><text:span text:style-name="T4">int</text:span></text:span></text:h>
      <text:p text:style-name="P4">O tipo int é utilizado para representar valores numéricos inteiros de 32 bits. É um dos tipos de dados mais utilizados para representar números inteiros em Java e possui uma faixa de valores de -2.147.483.648 a 2.147.483.647.</text:p>
      <text:h text:style-name="P5" text:outline-level="3"><text:span text:style-name="Strong_20_Emphasis"><text:span text:style-name="T4">long</text:span></text:span></text:h>
      <text:p text:style-name="P4">O tipo long é utilizado para representar valores numéricos inteiros de 64 bits. Ele é utilizado para representar valores inteiros muito grandes e possui uma faixa de valores de -9.223.372.036.854.775.808 a 9.223.372.036.854.775.807.</text:p>
      <text:h text:style-name="P5" text:outline-level="3"><text:soft-page-break/><text:span text:style-name="Strong_20_Emphasis"><text:span text:style-name="T4">float</text:span></text:span></text:h>
      <text:p text:style-name="P4">O tipo float é utilizado para representar valores numéricos de ponto flutuante, ou seja, valores com casas decimais, sendo que ocupa 32 bits de memória. Ele pode representar números decimais com até sete dígitos e tem uma precisão limitada, o que significa que ele pode arredondar os números se eles forem muito grandes ou muito pequenos.</text:p>
      <text:h text:style-name="P5" text:outline-level="3"><text:span text:style-name="Strong_20_Emphasis"><text:span text:style-name="T4">double</text:span></text:span></text:h>
      <text:p text:style-name="P4">O tipo double é similar o float, entretanto ele ocupa 64 bits de memória e pode representar números decimais com até 15 dígit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ncode Sans" svg:font-family="'Encode Sans', 'Encode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Flex" svg:font-family="'Roboto Flex', 'Roboto Flex Fallback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1:16:11.186856500</meta:creation-date>
    <dc:date>2026-06-18T11:16:41.500300400</dc:date>
    <meta:editing-duration>PT31S</meta:editing-duration>
    <meta:editing-cycles>1</meta:editing-cycles>
    <meta:document-statistic meta:table-count="0" meta:image-count="0" meta:object-count="0" meta:page-count="2" meta:paragraph-count="19" meta:word-count="339" meta:character-count="2123" meta:non-whitespace-character-count="1803"/>
    <meta:generator>LibreOffice/25.8.6.2$Windows_X86_64 LibreOffice_project/b4b39682cd9868fa725bc664aff94278d315bd04</meta:generator>
  </office:meta>
</office:document-meta>
</file>