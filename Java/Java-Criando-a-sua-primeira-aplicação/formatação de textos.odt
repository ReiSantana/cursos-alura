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Encode Sans" svg:font-family="'Encode Sans', 'Encode Sans Fallback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 Flex" svg:font-family="'Roboto Flex', 'Roboto Flex Fallback', sans-serif"/>
  </office:font-face-decls>
  <office:automatic-styles>
    <style:style style:name="P1" style:family="paragraph" style:parent-style-name="Heading_20_2">
      <style:text-properties fo:font-variant="normal" fo:text-transform="none" fo:color="#ededed" loext:opacity="100%" style:font-name="Encode Sans" fo:font-size="24pt" fo:letter-spacing="normal" fo:font-style="normal" fo:font-weight="normal" loext:padding="0.049cm" loext:border="0.06pt solid #000000"/>
    </style:style>
    <style:style style:name="P2" style:family="paragraph" style:parent-style-name="Text_20_body">
      <style:paragraph-properties fo:margin-left="0cm" fo:margin-right="0cm" fo:margin-top="0cm" fo:margin-bottom="0cm" style:contextual-spacing="false" style:line-height-at-least="0.529cm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.635cm" style:contextual-spacing="false" fo:orphans="2" fo:widows="2" fo:text-indent="0cm" style:auto-text-indent="false" fo:padding="0.049cm" fo:border="0.06pt solid #000000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000000"/>
    </style:style>
    <style:style style:name="P5" style:family="paragraph" style:parent-style-name="Preformatted_20_Text">
      <loext:graphic-properties draw:fill="solid" draw:fill-color="#0c0d0e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0c0d0e" fo:padding-left="0.847cm" fo:padding-right="0cm" fo:padding-top="0.847cm" fo:padding-bottom="0.847cm" fo:border-left="0.06pt solid #000000" fo:border-right="none" fo:border-top="0.06pt solid #000000" fo:border-bottom="0.06pt solid #000000"/>
    </style:style>
    <style:style style:name="P6" style:family="paragraph" style:parent-style-name="Text_20_body">
      <style:paragraph-properties fo:margin-left="0cm" fo:margin-right="0cm" fo:margin-top="0cm" fo:margin-bottom="0.635cm" style:contextual-spacing="false" fo:orphans="2" fo:widows="2" fo:text-indent="0cm" style:auto-text-indent="false" fo:padding="0.049cm" fo:border="0.06pt solid #000000"/>
      <style:text-properties fo:font-variant="normal" fo:text-transform="none" fo:color="#b1b2b9" loext:opacity="100%" style:font-name="Roboto Flex" fo:font-size="13.5pt" fo:letter-spacing="normal" fo:font-style="normal" fo:font-weight="normal"/>
    </style:style>
    <style:style style:name="P7" style:family="paragraph" style:parent-style-name="Text_20_body">
      <loext:graphic-properties draw:fill="solid" draw:fill-color="#292b2e" draw:opacity="100%"/>
      <style:paragraph-properties fo:margin-left="1cm" fo:margin-right="1cm" fo:margin-top="0cm" fo:margin-bottom="0.635cm" style:contextual-spacing="false" fo:orphans="2" fo:widows="2" fo:text-indent="0cm" style:auto-text-indent="false" fo:background-color="#292b2e" fo:padding="0.049cm" fo:border="0.06pt solid #000000"/>
      <style:text-properties fo:font-variant="normal" fo:text-transform="none" fo:color="#f4f5f6" loext:opacity="100%" style:font-name="Roboto Flex" fo:font-size="13.5pt" fo:letter-spacing="normal" fo:font-style="normal" fo:font-weight="normal"/>
    </style:style>
    <style:style style:name="T1" style:family="text">
      <style:text-properties fo:font-variant="normal" fo:text-transform="none" fo:color="#b1b2b9" loext:opacity="100%" fo:font-family="'JetBrains Mono', 'JetBrains Mono Fallback'" fo:font-size="9pt" fo:letter-spacing="normal" fo:font-style="normal" fo:font-weight="normal" loext:padding="0.049cm" loext:border="0.06pt solid #000000"/>
    </style:style>
    <style:style style:name="T2" style:family="text">
      <style:text-properties fo:font-variant="normal" fo:text-transform="none" fo:color="#b1b2b9" loext:opacity="100%" style:font-name="Roboto Flex" fo:font-size="13.5pt" fo:letter-spacing="normal" fo:font-style="normal" fo:font-weight="normal"/>
    </style:style>
    <style:style style:name="T3" style:family="text">
      <style:text-properties fo:font-variant="normal" fo:text-transform="none" fo:color="#f4f5f6" loext:opacity="100%" fo:font-family="ui-monospace, SFMono-Regular, Menlo, Monaco, Consolas, 'Liberation Mono', 'Courier New', monospace" fo:font-size="13.5pt" fo:letter-spacing="normal" fo:font-style="normal" fo:font-weight="normal" fo:background-color="#292b2e" loext:char-shading-value="0" loext:padding-left="0.159cm" loext:padding-right="0cm" loext:padding-top="0.049cm" loext:padding-bottom="0.053cm" loext:border-left="0.06pt solid #000000" loext:border-right="none" loext:border-top="0.06pt solid #000000" loext:border-bottom="0.06pt solid #000000"/>
    </style:style>
    <style:style style:name="T4" style:family="text">
      <style:text-properties fo:font-variant="normal" fo:text-transform="none" fo:color="#a6e22e" loext:opacity="100%" fo:font-family="ui-monospace, SFMono-Regular, Menlo, Monaco, Consolas, 'Liberation Mono', 'Courier New', monospace" fo:font-size="14pt" fo:letter-spacing="normal" fo:font-style="normal" fo:font-weight="bold" fo:background-color="#272822" loext:char-shading-value="0" loext:padding="0.049cm" loext:border="0.06pt solid #000000"/>
    </style:style>
    <style:style style:name="T5" style:family="text">
      <style:text-properties fo:font-variant="normal" fo:text-transform="none" fo:color="#dddddd" loext:opacity="100%" fo:font-family="ui-monospace, SFMono-Regular, Menlo, Monaco, Consolas, 'Liberation Mono', 'Courier New', monospace" fo:font-size="14pt" fo:letter-spacing="normal" fo:font-style="normal" fo:font-weight="normal" fo:background-color="#272822" loext:char-shading-value="0"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6" style:family="text">
      <style:text-properties fo:font-variant="normal" fo:text-transform="none" fo:color="#a6e22e" loext:opacity="100%" fo:font-family="ui-monospace, SFMono-Regular, Menlo, Monaco, Consolas, 'Liberation Mono', 'Courier New', monospace" fo:font-size="14pt" fo:letter-spacing="normal" fo:font-style="normal" fo:font-weight="normal" fo:background-color="#272822" loext:char-shading-value="0" loext:padding="0.049cm" loext:border="0.06pt solid #000000"/>
    </style:style>
    <style:style style:name="T7" style:family="text">
      <style:text-properties fo:font-variant="normal" fo:text-transform="none" fo:color="#66d9ef" loext:opacity="100%" fo:font-family="ui-monospace, SFMono-Regular, Menlo, Monaco, Consolas, 'Liberation Mono', 'Courier New', monospace" fo:font-size="14pt" fo:letter-spacing="normal" fo:font-style="normal" fo:font-weight="normal" fo:background-color="#272822" loext:char-shading-value="0" loext:padding="0.049cm" loext:border="0.06pt solid #000000"/>
    </style:style>
    <style:style style:name="T8" style:family="text">
      <style:text-properties fo:font-variant="normal" fo:text-transform="none" fo:color="#a6e22e" loext:opacity="100%" fo:letter-spacing="normal" fo:background-color="#272822" loext:char-shading-value="0" loext:padding="0.049cm" loext:border="0.06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ara saber mais: formatação de textos</text:h>
      <text:p text:style-name="P2"><text:span text:style-name="T1"/></text:p>
      <text:p text:style-name="P3"><text:span text:style-name="T2">Em Java, é possível formatar textos e números de diversas maneiras. Isso pode ser útil em diversas situações, como ao exibir valores para o usuário de uma maneira mais legível.</text:span></text:p>
      <text:p text:style-name="P4"><text:span text:style-name="T2">Uma das maneiras mais comuns de se formatar textos em Java é utilizando o método </text:span><text:span text:style-name="Source_20_Text"><text:span text:style-name="T3">format()</text:span></text:span><text:span text:style-name="T2">, da classe String. Esse método permite formatar um texto utilizando diversos placeholders, que são representados pelo caractere </text:span><text:span text:style-name="Source_20_Text"><text:span text:style-name="T3">%</text:span></text:span><text:span text:style-name="T2"> seguido de uma letra que indica o tipo de dado que será inserido no placeholder. Por exemplo, </text:span><text:span text:style-name="Source_20_Text"><text:span text:style-name="T3">%s</text:span></text:span><text:span text:style-name="T2"> indica que uma String será inserida no placeholder, </text:span><text:span text:style-name="Source_20_Text"><text:span text:style-name="T3">%d</text:span></text:span><text:span text:style-name="T2"> indica um valor inteiro e </text:span><text:span text:style-name="Source_20_Text"><text:span text:style-name="T3">%f</text:span></text:span><text:span text:style-name="T2"> indica um valor de ponto flutuante. Vamos ver um exemplo:</text:span></text:p>
      <text:p text:style-name="P5"><text:span text:style-name="Source_20_Text"><text:span text:style-name="T4">String</text:span></text:span><text:span text:style-name="Source_20_Text"><text:span text:style-name="T5"> nome = </text:span></text:span><text:span text:style-name="Source_20_Text"><text:span text:style-name="T6">"Maria"</text:span></text:span><text:span text:style-name="Source_20_Text"><text:span text:style-name="T5">;</text:span></text:span></text:p>
      <text:p text:style-name="P5"><text:span text:style-name="Source_20_Text"><text:span text:style-name="T4">int</text:span></text:span><text:span text:style-name="Source_20_Text"><text:span text:style-name="T5"> idade = </text:span></text:span><text:span text:style-name="Source_20_Text"><text:span text:style-name="T7">30</text:span></text:span><text:span text:style-name="Source_20_Text"><text:span text:style-name="T5">;</text:span></text:span></text:p>
      <text:p text:style-name="P5"><text:span text:style-name="Source_20_Text"><text:span text:style-name="T4">double</text:span></text:span><text:span text:style-name="Source_20_Text"><text:span text:style-name="T5"> valor = </text:span></text:span><text:span text:style-name="Source_20_Text"><text:span text:style-name="T7">55.9999</text:span></text:span><text:span text:style-name="Source_20_Text"><text:span text:style-name="T5">;</text:span></text:span></text:p>
      <text:p text:style-name="P5"><text:span text:style-name="Source_20_Text"><text:span text:style-name="T5">System.out.</text:span></text:span><text:span text:style-name="Source_20_Text"><text:span text:style-name="T6">println</text:span></text:span><text:span text:style-name="Source_20_Text"><text:span text:style-name="T5">(</text:span></text:span><text:span text:style-name="Source_20_Text"><text:span text:style-name="T4">String</text:span></text:span><text:span text:style-name="Source_20_Text"><text:span text:style-name="T5">.format(</text:span></text:span><text:span text:style-name="Source_20_Text"><text:span text:style-name="T6">"Meu nome é %s, eu tenho %d anos e hoje gastei %.2f reais"</text:span></text:span><text:span text:style-name="Source_20_Text"><text:span text:style-name="T5">, nome, idade, valor));</text:span></text:span></text:p>
      <text:p text:style-name="P5"/>
      <text:p text:style-name="P4"><text:span text:style-name="T2">Nesse exemplo, os valores das variáveis nome, idade e valor são passados como parâmetros para o método </text:span><text:span text:style-name="Source_20_Text"><text:span text:style-name="T3">String.format</text:span></text:span><text:span text:style-name="T2">, substituindo os placeholders </text:span><text:span text:style-name="Source_20_Text"><text:span text:style-name="T3">%s</text:span></text:span><text:span text:style-name="T2">, </text:span><text:span text:style-name="Source_20_Text"><text:span text:style-name="T3">%d</text:span></text:span><text:span text:style-name="T2"> e </text:span><text:span text:style-name="Source_20_Text"><text:span text:style-name="T3">%.2f</text:span></text:span><text:span text:style-name="T2">, respectivamente. O resultado impresso será "Meu nome é Maria, eu tenho 30 anos e hoje gastei 56,00 reais". Perceba também que o placeholder </text:span><text:span text:style-name="Source_20_Text"><text:span text:style-name="T3">%.2f</text:span></text:span><text:span text:style-name="T2"> indica que o valor deve ser formatado com duas casas decimais.</text:span></text:p>
      <text:p text:style-name="P4"><text:span text:style-name="T2">O resultado acaba sendo diferente do valor original porque o </text:span><text:span text:style-name="Source_20_Text"><text:span text:style-name="T3">%.2f</text:span></text:span><text:span text:style-name="T2"> aplica arredondamento para duas casas decimais e, como a terceira casa de 55.9999 é 9 (maior que 5), o valor é arredondado para cima, resultando em 56.00 e não 55.99.</text:span></text:p>
      <text:p text:style-name="P4"><text:span text:style-name="T2">Esse exemplo do que foi feito para o </text:span><text:span text:style-name="Source_20_Text"><text:span text:style-name="T3">String.format</text:span></text:span><text:span text:style-name="T2"> também pode ser usado com Text Block, onde usa-se o método que citei em aula, o formatted, para informar as variáveis que deverão ser utilizadas no lugar dos placeholders. Veja esse exemplo:</text:span></text:p>
      <text:p text:style-name="P5"><text:soft-page-break/><text:span text:style-name="Source_20_Text"><text:span text:style-name="T5">String nome = </text:span></text:span><text:span text:style-name="Source_20_Text"><text:span text:style-name="T6">"João"</text:span></text:span><text:span text:style-name="Source_20_Text"><text:span text:style-name="T5">;</text:span></text:span></text:p>
      <text:p text:style-name="P5"><text:span text:style-name="Source_20_Text"><text:span text:style-name="T6">int</text:span></text:span><text:span text:style-name="Source_20_Text"><text:span text:style-name="T5"> aulas = </text:span></text:span><text:span text:style-name="Source_20_Text"><text:span text:style-name="T7">4</text:span></text:span><text:span text:style-name="Source_20_Text"><text:span text:style-name="T5">;</text:span></text:span></text:p>
      <text:p text:style-name="P5"/>
      <text:p text:style-name="P5"><text:span text:style-name="Source_20_Text"><text:span text:style-name="T5">String mensagem = </text:span></text:span><text:span text:style-name="Source_20_Text"><text:span text:style-name="T6">"""</text:span></text:span></text:p>
      <text:p text:style-name="P5"><text:span text:style-name="Source_20_Text"><text:span text:style-name="T8"><text:s text:c="18"/></text:span></text:span><text:span text:style-name="Source_20_Text"><text:span text:style-name="T6">Olá, %s!</text:span></text:span></text:p>
      <text:p text:style-name="P5"><text:span text:style-name="Source_20_Text"><text:span text:style-name="T8"><text:s text:c="18"/></text:span></text:span><text:span text:style-name="Source_20_Text"><text:span text:style-name="T6">Boas vindas ao curso de Java.</text:span></text:span></text:p>
      <text:p text:style-name="P5"><text:span text:style-name="Source_20_Text"><text:span text:style-name="T8"><text:s text:c="18"/></text:span></text:span><text:span text:style-name="Source_20_Text"><text:span text:style-name="T6">Teremos %d aulas para te mostrar o que é preciso para você dar o seu primeiro mergulho na linguagem!</text:span></text:span></text:p>
      <text:p text:style-name="P5"><text:span text:style-name="Source_20_Text"><text:span text:style-name="T8"><text:s text:c="18"/></text:span></text:span><text:span text:style-name="Source_20_Text"><text:span text:style-name="T6">"""</text:span></text:span><text:span text:style-name="Source_20_Text"><text:span text:style-name="T5">.formatted(nome, aulas);</text:span></text:span></text:p>
      <text:p text:style-name="P5"/>
      <text:p text:style-name="P5"><text:span text:style-name="Source_20_Text"><text:span text:style-name="T5">System.out.println(mensagem);</text:span></text:span></text:p>
      <text:p text:style-name="P5"/>
      <text:p text:style-name="P6">O resultado impresso será:</text:p>
      <text:p text:style-name="P7">Olá, João!</text:p>
      <text:p text:style-name="P7">Boas vindas ao curso de Java.</text:p>
      <text:p text:style-name="P7">Teremos 4 aulas para te mostrar o que é preciso para você dar o seu primeiro mergulho na linguagem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Encode Sans" svg:font-family="'Encode Sans', 'Encode Sans Fallback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 Flex" svg:font-family="'Roboto Flex', 'Roboto Flex Fallback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8T12:30:51.648068000</meta:creation-date>
    <dc:date>2026-06-18T14:15:01.385689700</dc:date>
    <meta:editing-duration>PT1H44M9S</meta:editing-duration>
    <meta:editing-cycles>2</meta:editing-cycles>
    <meta:generator>LibreOffice/25.8.6.2$Windows_X86_64 LibreOffice_project/b4b39682cd9868fa725bc664aff94278d315bd04</meta:generator>
    <meta:document-statistic meta:table-count="0" meta:image-count="0" meta:object-count="0" meta:page-count="2" meta:paragraph-count="22" meta:word-count="356" meta:character-count="2172" meta:non-whitespace-character-count="1766"/>
  </office:meta>
</office:document-meta>
</file>