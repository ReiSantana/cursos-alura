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ncode Sans" svg:font-family="'Encode Sans', 'Encode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Flex" svg:font-family="'Roboto Flex', 'Roboto Flex Fallback', sans-serif"/>
  </office:font-face-decls>
  <office:automatic-styles>
    <style:style style:name="P1" style:family="paragraph" style:parent-style-name="Heading_20_2">
      <style:text-properties fo:font-variant="normal" fo:text-transform="none" fo:color="#ededed" loext:opacity="100%" style:font-name="Encode Sans" fo:font-size="24pt" fo:letter-spacing="normal" fo:font-style="normal" fo:font-weight="normal" loext:padding="0.049cm" loext:border="0.06pt solid #000000"/>
    </style:style>
    <style:style style:name="P2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</style:style>
    <style:style style:name="P3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P4" style:family="paragraph" style:parent-style-name="Preformatted_20_Text">
      <loext:graphic-properties draw:fill="solid" draw:fill-color="#0c0d0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0c0d0e" fo:padding-left="0.847cm" fo:padding-right="0cm" fo:padding-top="0.847cm" fo:padding-bottom="0.847cm" fo:border-left="0.06pt solid #000000" fo:border-right="none" fo:border-top="0.06pt solid #000000" fo:border-bottom="0.06pt solid #000000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T2" style:family="text">
      <style:text-properties fo:font-variant="normal" fo:text-transform="none" fo:color="#f92672" loext:opacity="100%" fo:font-family="ui-monospace, SFMono-Regular, Menlo, Monaco, Consolas, 'Liberation Mono', 'Courier New', monospace" fo:font-size="14pt" fo:letter-spacing="normal" fo:font-style="normal" fo:font-weight="bold" fo:background-color="#272822" loext:char-shading-value="0" loext:padding="0.049cm" loext:border="0.06pt solid #000000"/>
    </style:style>
    <style:style style:name="T3" style:family="text">
      <style:text-properties fo:font-variant="normal" fo:text-transform="none" fo:color="#dddddd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4" style:family="text">
      <style:text-properties fo:font-variant="normal" fo:text-transform="none" fo:color="#ae81ff" loext:opacity="100%" fo:font-family="ui-monospace, SFMono-Regular, Menlo, Monaco, Consolas, 'Liberation Mono', 'Courier New', monospace" fo:font-size="14pt" fo:letter-spacing="normal" fo:font-style="normal" fo:font-weight="bold" fo:background-color="#272822" loext:char-shading-value="0" loext:padding="0.049cm" loext:border="0.06pt solid #000000"/>
    </style:style>
    <style:style style:name="T5" style:family="text">
      <style:text-properties fo:font-variant="normal" fo:text-transform="none" fo:color="#dddddd" loext:opacity="100%" fo:letter-spacing="normal" fo:background-color="#272822" loext:char-shading-value="0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6" style:family="text">
      <style:text-properties fo:font-variant="normal" fo:text-transform="none" fo:color="#dddddd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="0.049cm" loext:border="0.06pt solid #000000"/>
    </style:style>
    <style:style style:name="T7" style:family="text">
      <style:text-properties fo:font-variant="normal" fo:text-transform="none" fo:color="#a6e22e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="0.049cm" loext:border="0.06pt solid #000000"/>
    </style:style>
    <style:style style:name="T8" style:family="text">
      <style:text-properties fo:font-variant="normal" fo:text-transform="none" fo:color="#f4f5f6" loext:opacity="100%" fo:font-family="ui-monospace, SFMono-Regular, Menlo, Monaco, Consolas, 'Liberation Mono', 'Courier New', monospace" fo:font-size="13.5pt" fo:letter-spacing="normal" fo:font-style="normal" fo:font-weight="normal" fo:background-color="#292b2e" loext:char-shading-value="0" loext:padding-left="0.159cm" loext:padding-right="0cm" loext:padding-top="0.049cm" loext:padding-bottom="0.053cm" loext:border-left="0.06pt solid #000000" loext:border-right="none" loext:border-top="0.06pt solid #000000" loext:border-bottom="0.06pt solid #000000"/>
    </style:style>
    <style:style style:name="T9" style:family="text">
      <style:text-properties fo:font-variant="normal" fo:text-transform="none" fo:color="#5f8bec" loext:opacity="100%" style:font-name="Roboto Flex" fo:font-size="13.5pt" fo:letter-spacing="normal" fo:font-style="normal" fo:font-weight="normal"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a saber mais: a classe Scanner</text:h>
      <text:p text:style-name="P2"><text:span text:style-name="T1">A classe Scanner do Java é utilizada para ler dados de entrada em um programa Java. Esses dados podem ser lidos a partir de várias fontes de entrada, como arquivos, fluxos de entrada, Strings e até mesmo a entrada do usuário através do teclado, como vimos em aula.</text:span></text:p>
      <text:p text:style-name="P3">Ela oferece uma série de métodos para ler dados de diferentes tipos, como inteiros, números de ponto flutuante, strings e caracteres.</text:p>
      <text:p text:style-name="P3">Para utilizar a classe Scanner, primeiro é necessário importá-la no início do seu programa. Provavelmente ao incluir a mesma no código, a IDE já vai sugerir o import. Esse import ficará como descrito abaixo:</text:p>
      <text:p text:style-name="P4"><text:span text:style-name="Source_20_Text"><text:span text:style-name="T2">import</text:span></text:span><text:span text:style-name="Source_20_Text"><text:span text:style-name="T3"> java.util.Scanner;</text:span></text:span></text:p>
      <text:p text:style-name="P3">Veja um exemplo básico de como utilizar a classe Scanner para ler dados distintos:</text:p>
      <text:p text:style-name="P4"><text:span text:style-name="Source_20_Text"><text:span text:style-name="T2">public</text:span></text:span><text:span text:style-name="Source_20_Text"><text:span text:style-name="T3"> </text:span></text:span><text:span text:style-name="Source_20_Text"><text:span text:style-name="T2">class</text:span></text:span><text:span text:style-name="Source_20_Text"><text:span text:style-name="T3"> </text:span></text:span><text:span text:style-name="Source_20_Text"><text:span text:style-name="T4">ExemploScanner</text:span></text:span><text:span text:style-name="Source_20_Text"><text:span text:style-name="T3"> {</text:span></text:span></text:p>
      <text:p text:style-name="P4"><text:span text:style-name="Source_20_Text"><text:span text:style-name="T5"><text:s text:c="4"/></text:span></text:span><text:span text:style-name="Source_20_Text"><text:span text:style-name="T2">public</text:span></text:span><text:span text:style-name="Source_20_Text"><text:span text:style-name="T6"> </text:span></text:span><text:span text:style-name="Source_20_Text"><text:span text:style-name="T2">static</text:span></text:span><text:span text:style-name="Source_20_Text"><text:span text:style-name="T6"> </text:span></text:span><text:span text:style-name="Source_20_Text"><text:span text:style-name="T2">void</text:span></text:span><text:span text:style-name="Source_20_Text"><text:span text:style-name="T6"> </text:span></text:span><text:span text:style-name="Source_20_Text"><text:span text:style-name="T4">main</text:span></text:span><text:span text:style-name="Source_20_Text"><text:span text:style-name="T6">(String[] </text:span></text:span><text:span text:style-name="Source_20_Text"><text:span text:style-name="T2">args</text:span></text:span><text:span text:style-name="Source_20_Text"><text:span text:style-name="T6">)</text:span></text:span><text:span text:style-name="Source_20_Text"><text:span text:style-name="T3"> {</text:span></text:span></text:p>
      <text:p text:style-name="P4"><text:span text:style-name="Source_20_Text"><text:span text:style-name="T5"><text:s text:c="8"/></text:span></text:span><text:span text:style-name="Source_20_Text"><text:span text:style-name="T3">Scanner scanner = </text:span></text:span><text:span text:style-name="Source_20_Text"><text:span text:style-name="T2">new</text:span></text:span><text:span text:style-name="Source_20_Text"><text:span text:style-name="T3"> Scanner(System.</text:span></text:span><text:span text:style-name="Source_20_Text"><text:span text:style-name="T2">in</text:span></text:span><text:span text:style-name="Source_20_Text"><text:span text:style-name="T3">);</text:span></text:span></text:p>
      <text:p text:style-name="P4"/>
      <text:p text:style-name="P4"><text:span text:style-name="Source_20_Text"><text:span text:style-name="T5"><text:s text:c="8"/></text:span></text:span><text:span text:style-name="Source_20_Text"><text:span text:style-name="T3">System.</text:span></text:span><text:span text:style-name="Source_20_Text"><text:span text:style-name="T2">out</text:span></text:span><text:span text:style-name="Source_20_Text"><text:span text:style-name="T3">.print(</text:span></text:span><text:span text:style-name="Source_20_Text"><text:span text:style-name="T7">"Digite seu nome: "</text:span></text:span><text:span text:style-name="Source_20_Text"><text:span text:style-name="T3">);</text:span></text:span></text:p>
      <text:p text:style-name="P4"><text:span text:style-name="Source_20_Text"><text:span text:style-name="T5"><text:s text:c="8"/></text:span></text:span><text:span text:style-name="Source_20_Text"><text:span text:style-name="T3">String nome = scanner.nextLine();</text:span></text:span></text:p>
      <text:p text:style-name="P4"><text:span text:style-name="Source_20_Text"><text:span text:style-name="T5"><text:s text:c="8"/></text:span></text:span><text:span text:style-name="Source_20_Text"><text:span text:style-name="T3">System.</text:span></text:span><text:span text:style-name="Source_20_Text"><text:span text:style-name="T2">out</text:span></text:span><text:span text:style-name="Source_20_Text"><text:span text:style-name="T3">.print(</text:span></text:span><text:span text:style-name="Source_20_Text"><text:span text:style-name="T7">"Digite sua idade: "</text:span></text:span><text:span text:style-name="Source_20_Text"><text:span text:style-name="T3">);</text:span></text:span></text:p>
      <text:p text:style-name="P4"><text:span text:style-name="Source_20_Text"><text:span text:style-name="T5"><text:s text:c="8"/></text:span></text:span><text:span text:style-name="Source_20_Text"><text:span text:style-name="T7">int</text:span></text:span><text:span text:style-name="Source_20_Text"><text:span text:style-name="T3"> idade = scanner.nextInt();</text:span></text:span></text:p>
      <text:p text:style-name="P4"><text:span text:style-name="Source_20_Text"><text:span text:style-name="T5"><text:s text:c="8"/></text:span></text:span><text:span text:style-name="Source_20_Text"><text:span text:style-name="T3">System.</text:span></text:span><text:span text:style-name="Source_20_Text"><text:span text:style-name="T2">out</text:span></text:span><text:span text:style-name="Source_20_Text"><text:span text:style-name="T3">.print(</text:span></text:span><text:span text:style-name="Source_20_Text"><text:span text:style-name="T7">"Digite o valor que pretende investir esse mês: "</text:span></text:span><text:span text:style-name="Source_20_Text"><text:span text:style-name="T3">);</text:span></text:span></text:p>
      <text:p text:style-name="P4"><text:span text:style-name="Source_20_Text"><text:span text:style-name="T5"><text:s text:c="8"/></text:span></text:span><text:span text:style-name="Source_20_Text"><text:span text:style-name="T7">double</text:span></text:span><text:span text:style-name="Source_20_Text"><text:span text:style-name="T3"> valor = scanner.nextDouble();</text:span></text:span></text:p>
      <text:p text:style-name="P4"/>
      <text:p text:style-name="P4"><text:span text:style-name="Source_20_Text"><text:span text:style-name="T5"><text:s text:c="8"/></text:span></text:span><text:span text:style-name="Source_20_Text"><text:span text:style-name="T3">System.</text:span></text:span><text:span text:style-name="Source_20_Text"><text:span text:style-name="T2">out</text:span></text:span><text:span text:style-name="Source_20_Text"><text:span text:style-name="T3">.println(nome + </text:span></text:span><text:span text:style-name="Source_20_Text"><text:span text:style-name="T7">" que tem "</text:span></text:span><text:span text:style-name="Source_20_Text"><text:span text:style-name="T3"> + idade + </text:span></text:span><text:span text:style-name="Source_20_Text"><text:span text:style-name="T7">" anos, irá investir R$ "</text:span></text:span><text:span text:style-name="Source_20_Text"><text:span text:style-name="T3"> + valor + </text:span></text:span><text:span text:style-name="Source_20_Text"><text:span text:style-name="T7">" esse mês."</text:span></text:span><text:span text:style-name="Source_20_Text"><text:span text:style-name="T3">);</text:span></text:span></text:p>
      <text:p text:style-name="P4"/>
      <text:p text:style-name="P4"><text:span text:style-name="Source_20_Text"><text:span text:style-name="T5"><text:s text:c="8"/></text:span></text:span><text:span text:style-name="Source_20_Text"><text:span text:style-name="T3">scanner.close();</text:span></text:span></text:p>
      <text:p text:style-name="P4"><text:soft-page-break/><text:span text:style-name="Source_20_Text"><text:span text:style-name="T5"><text:s text:c="4"/></text:span></text:span><text:span text:style-name="Source_20_Text"><text:span text:style-name="T3">}</text:span></text:span></text:p>
      <text:p text:style-name="P4"><text:span text:style-name="Source_20_Text"><text:span text:style-name="T3">}</text:span></text:span></text:p>
      <text:p text:style-name="P4"/>
      <text:p text:style-name="P5"><text:span text:style-name="T1">Nesse exemplo, primeiro importamos a classe Scanner e, em seguida, criamos uma instância dela passando o objeto </text:span><text:span text:style-name="Source_20_Text"><text:span text:style-name="T8">System.in</text:span></text:span><text:span text:style-name="T1">' como parâmetro para indicar que queremos ler a entrada do usuário pelo teclado.</text:span></text:p>
      <text:p text:style-name="P5"><text:span text:style-name="T1">Depois, usamos o método </text:span><text:span text:style-name="Source_20_Text"><text:span text:style-name="T8">nextLine()</text:span></text:span><text:span text:style-name="T1"> para ler uma linha de texto. Além desse, utilizamos também o </text:span><text:span text:style-name="Source_20_Text"><text:span text:style-name="T8">nextInt()</text:span></text:span><text:span text:style-name="T1"> para ler um número inteiro e o </text:span><text:span text:style-name="Source_20_Text"><text:span text:style-name="T8">nextDouble()</text:span></text:span><text:span text:style-name="T1"> para ler um número decimal.</text:span></text:p>
      <text:p text:style-name="P5"><text:span text:style-name="T1">Você pode encontrar a lista completa de métodos na </text:span><text:a xlink:type="simple" xlink:href="https://docs.oracle.com/en/java/javase/17/docs/api/java.base/java/util/Scanner.html" text:style-name="Internet_20_link" text:visited-style-name="Visited_20_Internet_20_Link"><text:span text:style-name="T9">documentação oficial do Java</text:span></text:a><text:span text:style-name="T1">.</text:span></text:p>
      <text:section text:style-name="Sect1" text:name="task-content-extra-action-slot">
        <text:p text:style-name="P6"/>
      </text:section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ncode Sans" svg:font-family="'Encode Sans', 'Encode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Flex" svg:font-family="'Roboto Flex', 'Roboto Flex Fallback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16:46:05.040838800</meta:creation-date>
    <dc:date>2026-06-18T16:46:42.170257800</dc:date>
    <meta:editing-duration>PT37S</meta:editing-duration>
    <meta:editing-cycles>1</meta:editing-cycles>
    <meta:document-statistic meta:table-count="0" meta:image-count="0" meta:object-count="0" meta:page-count="2" meta:paragraph-count="23" meta:word-count="267" meta:character-count="1754" meta:non-whitespace-character-count="1428"/>
    <meta:generator>LibreOffice/25.8.6.2$Windows_X86_64 LibreOffice_project/b4b39682cd9868fa725bc664aff94278d315bd04</meta:generator>
  </office:meta>
</office:document-meta>
</file>