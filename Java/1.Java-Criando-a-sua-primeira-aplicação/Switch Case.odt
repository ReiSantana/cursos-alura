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automatic-styles>
    <style:style style:name="P1" style:family="paragraph" style:parent-style-name="Heading_20_2">
      <style:text-properties fo:font-variant="normal" fo:text-transform="none" fo:color="#ededed" loext:opacity="100%" style:font-name="Encode Sans" fo:font-size="24pt" fo:letter-spacing="normal" fo:font-style="normal" fo:font-weight="normal" loext:padding="0.049cm" loext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4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5" style:family="paragraph" style:parent-style-name="Preformatted_20_Text">
      <loext:graphic-properties draw:fill="solid" draw:fill-color="#0c0d0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c0d0e" fo:padding-left="0.847cm" fo:padding-right="0cm" fo:padding-top="0.847cm" fo:padding-bottom="0.847cm" fo:border-left="0.06pt solid #000000" fo:border-right="none" fo:border-top="0.06pt solid #000000" fo:border-bottom="0.06pt solid #000000"/>
    </style:style>
    <style:style style:name="T1" style:family="text"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T2" style:family="text">
      <style:text-properties fo:font-variant="normal" fo:text-transform="none" fo:color="#b1b2b9" loext:opacity="100%" style:font-name="Roboto Flex" fo:font-size="13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f92672" loext:opacity="100%" fo:font-family="ui-monospace, SFMono-Regular, Menlo, Monaco, Consolas, 'Liberation Mono', 'Courier New', monospace" fo:font-size="14pt" fo:letter-spacing="normal" fo:font-style="normal" fo:font-weight="bold" fo:background-color="#272822" loext:char-shading-value="0" loext:padding="0.049cm" loext:border="0.06pt solid #000000"/>
    </style:style>
    <style:style style:name="T4" style:family="text">
      <style:text-properties fo:font-variant="normal" fo:text-transform="none" fo:color="#dddddd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5" style:family="text">
      <style:text-properties fo:font-variant="normal" fo:text-transform="none" fo:color="#dddddd" loext:opacity="100%" fo:letter-spacing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fo:color="#949688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7" style:family="text">
      <style:text-properties fo:font-variant="normal" fo:text-transform="none" fo:color="#f4f5f6" loext:opacity="100%" fo:font-family="ui-monospace, SFMono-Regular, Menlo, Monaco, Consolas, 'Liberation Mono', 'Courier New', monospace" fo:font-size="13.5pt" fo:letter-spacing="normal" fo:font-style="normal" fo:font-weight="normal" fo:background-color="#292b2e" loext:char-shading-value="0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8" style:family="text">
      <style:text-properties fo:font-variant="normal" fo:text-transform="none" fo:color="#a6e22e" loext:opacity="100%" fo:font-family="ui-monospace, SFMono-Regular, Menlo, Monaco, Consolas, 'Liberation Mono', 'Courier New', monospace" fo:font-size="14pt" fo:letter-spacing="normal" fo:font-style="normal" fo:font-weight="bold" fo:background-color="#272822" loext:char-shading-value="0" loext:padding="0.049cm" loext:border="0.06pt solid #000000"/>
    </style:style>
    <style:style style:name="T9" style:family="text">
      <style:text-properties fo:font-variant="normal" fo:text-transform="none" fo:color="#66d9ef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10" style:family="text">
      <style:text-properties fo:font-variant="normal" fo:text-transform="none" fo:color="#a6e22e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a saber mais: Switch Case</text:h>
      <text:p text:style-name="P2"/>
      <text:p text:style-name="P3"><text:span text:style-name="T1">Uma alternativa ao if/else é o </text:span><text:span text:style-name="Strong_20_Emphasis"><text:span text:style-name="T2">switch case</text:span></text:span><text:span text:style-name="T1">, que é uma estrutura de controle de fluxo que permite executar diferentes ações com base no valor de uma expressão. É uma forma mais simplificada e legível de escrever vários blocos if/else encadeados.</text:span></text:p>
      <text:p text:style-name="P4">A sintaxe do switch case em Java é a seguinte:</text:p>
      <text:p text:style-name="P5"><text:span text:style-name="Source_20_Text"><text:span text:style-name="T3">switch</text:span></text:span><text:span text:style-name="Source_20_Text"><text:span text:style-name="T4"> (expressão) {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valor1:</text:span></text:span></text:p>
      <text:p text:style-name="P5"><text:span text:style-name="Source_20_Text"><text:span text:style-name="T5"><text:s text:c="6"/></text:span></text:span><text:span text:style-name="Source_20_Text"><text:span text:style-name="T6">// código a ser executado se a expressão for igual a valor1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valor2:</text:span></text:span></text:p>
      <text:p text:style-name="P5"><text:span text:style-name="Source_20_Text"><text:span text:style-name="T5"><text:s text:c="6"/></text:span></text:span><text:span text:style-name="Source_20_Text"><text:span text:style-name="T6">// código a ser executado se a expressão for igual a valor2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valor3:</text:span></text:span></text:p>
      <text:p text:style-name="P5"><text:span text:style-name="Source_20_Text"><text:span text:style-name="T5"><text:s text:c="6"/></text:span></text:span><text:span text:style-name="Source_20_Text"><text:span text:style-name="T6">// código a ser executado se a expressão for igual a valor3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4">...</text:span></text:span></text:p>
      <text:p text:style-name="P5"><text:span text:style-name="Source_20_Text"><text:span text:style-name="T5"><text:s text:c="3"/></text:span></text:span><text:span text:style-name="Source_20_Text"><text:span text:style-name="T3">default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6">// código a ser executado se a expressão não for igual a nenhum valor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4">}</text:span></text:span></text:p>
      <text:p text:style-name="P3"><text:span text:style-name="T1">A </text:span><text:span text:style-name="Source_20_Text"><text:span text:style-name="T7">expressão</text:span></text:span><text:span text:style-name="T1"> é uma variável ou uma expressão de código que será avaliada. Cada </text:span><text:span text:style-name="Source_20_Text"><text:span text:style-name="T7">case</text:span></text:span><text:span text:style-name="T1"> é uma possível condição que pode ser atendida pela expressão. Quando a expressão é igual ao valor especificado em um determinado case, o código correspondente a esse case será executado. A palavra-chave </text:span><text:span text:style-name="Strong_20_Emphasis"><text:span text:style-name="T2">break</text:span></text:span><text:span text:style-name="T1"> é usada para sair do switch case após a execução do código correspondente.</text:span></text:p>
      <text:p text:style-name="P4">O case default é opcional e é executado quando nenhum dos cases especificados é atendido.</text:p>
      <text:p text:style-name="P4"><text:soft-page-break/>Veja um exemplo simples de uso do switch case em Java para verificar o dia da semana com base em um número inteiro:</text:p>
      <text:p text:style-name="P5"><text:span text:style-name="Source_20_Text"><text:span text:style-name="T8">int</text:span></text:span><text:span text:style-name="Source_20_Text"><text:span text:style-name="T4"> dia = </text:span></text:span><text:span text:style-name="Source_20_Text"><text:span text:style-name="T9">3</text:span></text:span><text:span text:style-name="Source_20_Text"><text:span text:style-name="T4">;</text:span></text:span></text:p>
      <text:p text:style-name="P5"><text:span text:style-name="Source_20_Text"><text:span text:style-name="T8">String</text:span></text:span><text:span text:style-name="Source_20_Text"><text:span text:style-name="T4"> nomeDia;</text:span></text:span></text:p>
      <text:p text:style-name="P5"/>
      <text:p text:style-name="P5"><text:span text:style-name="Source_20_Text"><text:span text:style-name="T3">switch</text:span></text:span><text:span text:style-name="Source_20_Text"><text:span text:style-name="T4"> (dia) {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</text:span></text:span><text:span text:style-name="Source_20_Text"><text:span text:style-name="T9">1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domingo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</text:span></text:span><text:span text:style-name="Source_20_Text"><text:span text:style-name="T9">2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segunda-feira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</text:span></text:span><text:span text:style-name="Source_20_Text"><text:span text:style-name="T9">3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terça-feira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</text:span></text:span><text:span text:style-name="Source_20_Text"><text:span text:style-name="T9">4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quarta-feira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</text:span></text:span><text:span text:style-name="Source_20_Text"><text:span text:style-name="T9">5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quinta-feira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</text:span></text:span><text:span text:style-name="Source_20_Text"><text:span text:style-name="T9">6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sexta-feira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case</text:span></text:span><text:span text:style-name="Source_20_Text"><text:span text:style-name="T4"> </text:span></text:span><text:span text:style-name="Source_20_Text"><text:span text:style-name="T9">7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sábado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5"><text:s text:c="3"/></text:span></text:span><text:span text:style-name="Source_20_Text"><text:span text:style-name="T3">default</text:span></text:span><text:span text:style-name="Source_20_Text"><text:span text:style-name="T4">:</text:span></text:span></text:p>
      <text:p text:style-name="P5"><text:span text:style-name="Source_20_Text"><text:span text:style-name="T5"><text:s text:c="6"/></text:span></text:span><text:span text:style-name="Source_20_Text"><text:span text:style-name="T4">nomeDia = </text:span></text:span><text:span text:style-name="Source_20_Text"><text:span text:style-name="T10">"Dia inválido"</text:span></text:span><text:span text:style-name="Source_20_Text"><text:span text:style-name="T4">;</text:span></text:span></text:p>
      <text:p text:style-name="P5"><text:span text:style-name="Source_20_Text"><text:span text:style-name="T5"><text:s text:c="6"/></text:span></text:span><text:span text:style-name="Source_20_Text"><text:span text:style-name="T3">break</text:span></text:span><text:span text:style-name="Source_20_Text"><text:span text:style-name="T4">;</text:span></text:span></text:p>
      <text:p text:style-name="P5"><text:span text:style-name="Source_20_Text"><text:span text:style-name="T4">}</text:span></text:span></text:p>
      <text:p text:style-name="P5"/>
      <text:p text:style-name="P5"><text:span text:style-name="Source_20_Text"><text:span text:style-name="T4">System.out.</text:span></text:span><text:span text:style-name="Source_20_Text"><text:span text:style-name="T10">println</text:span></text:span><text:span text:style-name="Source_20_Text"><text:span text:style-name="T4">(</text:span></text:span><text:span text:style-name="Source_20_Text"><text:span text:style-name="T10">"O dia "</text:span></text:span><text:span text:style-name="Source_20_Text"><text:span text:style-name="T4"> + dia + </text:span></text:span><text:span text:style-name="Source_20_Text"><text:span text:style-name="T10">" é "</text:span></text:span><text:span text:style-name="Source_20_Text"><text:span text:style-name="T4"> + nomeDia);</text:span></text:span></text:p>
      <text:p text:style-name="P4">Nesse exemplo, a expressão é a variável dia, que contém o valor 3. O switch case verifica o valor da variável dia e executa o código correspondente ao caso <text:soft-page-break/>em que dia é igual a 3. O resultado será a impressão no console: "O dia 3 é terça-feira".</text:p>
      <text:p text:style-name="P3"><text:span text:style-name="Strong_20_Emphasis"><text:span text:style-name="T2">Vantagens do switch case:</text:span></text:span></text:p>
      <text:p text:style-name="P4">Em resumo, o switch case torna o código mais fácil de entender e mais legível, em comparação ao if/else, especialmente quando há várias condições possívei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6:28:04.189314200</meta:creation-date>
    <dc:date>2026-06-18T16:28:41.943806200</dc:date>
    <meta:editing-duration>PT38S</meta:editing-duration>
    <meta:editing-cycles>1</meta:editing-cycles>
    <meta:document-statistic meta:table-count="0" meta:image-count="0" meta:object-count="0" meta:page-count="3" meta:paragraph-count="53" meta:word-count="367" meta:character-count="2223" meta:non-whitespace-character-count="1726"/>
    <meta:generator>LibreOffice/25.8.6.2$Windows_X86_64 LibreOffice_project/b4b39682cd9868fa725bc664aff94278d315bd04</meta:generator>
  </office:meta>
</office:document-meta>
</file>