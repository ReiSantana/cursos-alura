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</style:style>
    <style:style style:name="P4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b1b2b9" loext:opacity="100%" fo:font-family="'JetBrains Mono', 'JetBrains Mono Fallback'" fo:font-size="9pt" fo:letter-spacing="normal" fo:font-style="normal" fo:font-weight="normal" loext:padding="0.049cm" loext:border="0.06pt solid #000000"/>
    </style:style>
    <style:style style:name="T2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3" style:family="text">
      <style:text-properties fo:font-variant="normal" fo:text-transform="none" fo:color="#b1b2b9" loext:opacity="100%" style:font-name="Roboto Flex" fo:font-size="14pt" fo:letter-spacing="normal" fo:font-style="normal" fo:font-weight="normal"/>
    </style:style>
    <style:style style:name="T4" style:family="text">
      <style:text-properties fo:font-variant="normal" fo:text-transform="none" fo:color="#f4f5f6" loext:opacity="100%" fo:font-family="ui-monospace, SFMono-Regular, Menlo, Monaco, Consolas, 'Liberation Mono', 'Courier New', monospace" fo:font-size="14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5" style:family="text">
      <style:text-properties fo:font-variant="normal" fo:text-transform="none" fo:color="#f4f5f6" loext:opacity="100%" fo:font-family="ui-monospace, SFMono-Regular, Menlo, Monaco, Consolas, 'Liberation Mono', 'Courier New', monospace" fo:font-size="13.5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convenção de código</text:h>
      <text:p text:style-name="P2"><text:span text:style-name="T1"/></text:p>
      <text:p text:style-name="P3"><text:span text:style-name="T2">A convenção de código do Java é um conjunto de regras recomendadas para escrever código Java que é fácil de ler, entender e manter. Essas regras foram definidas pela Oracle, a empresa que mantém a linguagem Java, e são amplamente seguidas pela comunidade de desenvolvedores Java.</text:span></text:p>
      <text:p text:style-name="P4">Aqui estão algumas das principais convenções de código do Java:</text:p>
      <text:list text:style-name="L1">
        <text:list-item>
          <text:p text:style-name="P5">Nomes de classes devem começar com letra maiúscula e usar a convenção PascalCase (também conhecida como Upper CamelCase).</text:p>
          <text:list>
            <text:list-item>
              <text:p text:style-name="P6"><text:span text:style-name="T3">Exemplo: </text:span><text:span text:style-name="Source_20_Text"><text:span text:style-name="T4">MinhaClasse</text:span></text:span><text:span text:style-name="T3">.</text:span></text:p>
            </text:list-item>
          </text:list>
        </text:list-item>
        <text:list-item>
          <text:p text:style-name="P5">Nomes de métodos devem começar com letra minúscula e usar a convenção camelCase.</text:p>
          <text:list>
            <text:list-item>
              <text:p text:style-name="P6"><text:span text:style-name="T3">Exemplo: </text:span><text:span text:style-name="Source_20_Text"><text:span text:style-name="T4">meuMetodo()</text:span></text:span><text:span text:style-name="T3">.</text:span></text:p>
            </text:list-item>
          </text:list>
        </text:list-item>
        <text:list-item>
          <text:p text:style-name="P5">Nomes de constantes devem ser totalmente em letras maiúsculas, separadas por underline.</text:p>
          <text:list>
            <text:list-item>
              <text:p text:style-name="P6"><text:span text:style-name="T3">Exemplo: </text:span><text:span text:style-name="Source_20_Text"><text:span text:style-name="T4">MINHA_CONSTANTE</text:span></text:span><text:span text:style-name="T3">.</text:span></text:p>
            </text:list-item>
          </text:list>
        </text:list-item>
        <text:list-item>
          <text:p text:style-name="P5">Nomes de variáveis devem começar com letra minúscula e usar a convenção camelCase.</text:p>
          <text:list>
            <text:list-item>
              <text:p text:style-name="P6"><text:span text:style-name="T3">Exemplo: </text:span><text:span text:style-name="Source_20_Text"><text:span text:style-name="T4">minhaVariavel</text:span></text:span><text:span text:style-name="T3">.</text:span></text:p>
            </text:list-item>
          </text:list>
        </text:list-item>
        <text:list-item>
          <text:p text:style-name="P5">Todas as linhas de código devem ter no máximo 80 caracteres de largura para facilitar a leitura.</text:p>
        </text:list-item>
        <text:list-item>
          <text:p text:style-name="P5">Recomenda-se usar espaços em branco para separar operadores, palavras-chave e elementos de controle de fluxo.</text:p>
          <text:list>
            <text:list-item>
              <text:p text:style-name="P6"><text:span text:style-name="T3">Exemplo: </text:span><text:span text:style-name="Source_20_Text"><text:span text:style-name="T4">if (condicao) {</text:span></text:span><text:span text:style-name="T3">.</text:span></text:p>
            </text:list-item>
          </text:list>
        </text:list-item>
        <text:list-item>
          <text:p text:style-name="P5">Use comentários para documentar seu código, explicando o que ele faz e por que ele faz isso. Comentários devem ser claros e concisos.</text:p>
        </text:list-item>
      </text:list>
      <text:p text:style-name="P4">Esse ponto anterior, referente aos comentários, é polêmico, pois muitas pessoas desenvolvedoras consideram que um bom código deve ser <text:soft-page-break/>autoexplicativo. Se você utiliza nomes intuitivos e descritivos para suas variáveis e métodos, fica mais claro de entender o que está acontecendo no código, dispensando a necessidade de uso de comentários.</text:p>
      <text:p text:style-name="P4">Essas são apenas algumas das convenções de código mais comuns no Java. Seguir essas regras pode tornar seu código mais fácil de ler e entender, o que pode economizar tempo e esforço no longo prazo.</text:p>
      <text:p text:style-name="P7"><text:span text:style-name="T2">É importante lembrar que as convenções de código são apenas </text:span><text:span text:style-name="Source_20_Text"><text:span text:style-name="T5">recomendações</text:span></text:span><text:span text:style-name="T2">, e não regras obrigatórias. No entanto, seguir essas convenções pode ajudar a criar um padrão consistente em todo o seu código Java e também torná-lo mais fácil de compartilhar e colaborar com outros desenvolvedor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1:05:28.427783900</meta:creation-date>
    <dc:date>2026-06-18T11:06:36.989058400</dc:date>
    <meta:editing-duration>PT1M11S</meta:editing-duration>
    <meta:editing-cycles>1</meta:editing-cycles>
    <meta:document-statistic meta:table-count="0" meta:image-count="0" meta:object-count="0" meta:page-count="2" meta:paragraph-count="18" meta:word-count="327" meta:character-count="2039" meta:non-whitespace-character-count="1742"/>
    <meta:generator>LibreOffice/25.8.6.2$Windows_X86_64 LibreOffice_project/b4b39682cd9868fa725bc664aff94278d315bd04</meta:generator>
  </office:meta>
</office:document-meta>
</file>